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PT Sans Narrow" svg:font-family="'PT Sans Narrow', sans-serif"/>
  </office:font-face-decls>
  <office:automatic-styles>
    <style:style style:name="P1" style:family="paragraph" style:parent-style-name="Text_20_body">
      <style:paragraph-properties fo:margin-left="0cm" fo:margin-right="0cm" fo:margin-top="0.564cm" fo:margin-bottom="0cm" style:contextual-spacing="false" fo:line-height="120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PT Sans Narrow" fo:font-size="4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353cm" fo:margin-bottom="0cm" style:contextual-spacing="false" fo:line-height="120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PT Sans Narrow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2.54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.212cm" fo:margin-bottom="0cm" style:contextual-spacing="false" fo:line-height="120%" fo:text-indent="0cm" style:auto-text-indent="fals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5" style:family="paragraph" style:parent-style-name="Heading_20_1">
      <style:paragraph-properties fo:margin-left="0cm" fo:margin-right="0cm" fo:margin-top="0.847cm" fo:margin-bottom="0cm" style:contextual-spacing="false" fo:line-height="156%" fo:text-indent="0cm" style:auto-text-indent="false" style:writing-mode="lr-tb"/>
      <style:text-properties fo:font-variant="normal" fo:text-transform="none" fo:color="#ff5e0e" loext:opacity="100%" style:text-line-through-style="none" style:text-line-through-type="none" style:font-name="PT Sans Narrow" fo:font-size="18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.212cm" fo:margin-bottom="0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cm" fo:margin-right="0cm" fo:margin-top="0.212cm" fo:margin-bottom="0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4" style:family="paragraph" style:parent-style-name="Heading_20_2">
      <style:paragraph-properties fo:margin-left="0cm" fo:margin-right="0cm" fo:margin-top="0.635cm" fo:margin-bottom="0.141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0cm" fo:margin-right="0cm" fo:margin-top="0.423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.423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left="0cm" fo:margin-right="0cm" fo:margin-top="0.423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.423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">
      <loext:graphic-properties draw:fill="none" draw:fill-color="#ffffff"/>
      <style:paragraph-properties fo:margin-left="0cm" fo:margin-right="0cm" fo:margin-top="0.423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.423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7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9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30" style:family="paragraph" style:parent-style-name="Heading_20_2">
      <style:paragraph-properties fo:margin-left="0cm" fo:margin-right="0cm" fo:margin-top="0.564cm" fo:margin-bottom="0cm" style:contextual-spacing="false" fo:line-height="120%" fo:text-indent="0cm" style:auto-text-indent="false" style:writing-mode="lr-tb"/>
    </style:style>
    <style:style style:name="P31" style:family="paragraph" style:parent-style-name="Text_20_body" style:list-style-name="L10">
      <loext:graphic-properties draw:fill="none" draw:fill-color="#ffffff"/>
      <style:paragraph-properties fo:margin-left="0cm" fo:margin-right="0cm" fo:margin-top="0.212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44%" fo:text-indent="0cm" style:auto-text-indent="false" fo:background-color="transparent" fo:padding="0cm" fo:border="non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cm" fo:margin-right="0cm" fo:margin-top="0.212cm" fo:margin-bottom="0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bold" style:text-blinking="false" fo:background-color="transparent"/>
    </style:style>
    <style:style style:name="P34" style:family="paragraph" style:parent-style-name="Heading_20_2">
      <style:paragraph-properties fo:margin-left="0cm" fo:margin-right="0cm" fo:margin-top="0.564cm" fo:margin-bottom="0cm" style:contextual-spacing="false" fo:line-height="120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/>
    </style:style>
    <style:style style:name="P35" style:family="paragraph" style:parent-style-name="Text_20_body">
      <style:paragraph-properties fo:margin-left="0cm" fo:margin-right="0cm" fo:margin-top="0.212cm" fo:margin-bottom="0cm" style:contextual-spacing="false" fo:line-height="144%" fo:text-indent="0cm" style:auto-text-indent="false" style:writing-mode="lr-tb"/>
    </style:style>
    <style:style style:name="P36" style:family="paragraph" style:parent-style-name="Heading_20_2" style:list-style-name="L11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1.27cm" fo:margin-right="0cm" fo:margin-top="0.212cm" fo:margin-bottom="0cm" style:contextual-spacing="false" fo:line-height="144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38" style:family="paragraph" style:parent-style-name="Heading_20_2" style:list-style-name="L12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1.27cm" fo:margin-right="0cm" fo:margin-top="0.212cm" fo:margin-bottom="0cm" style:contextual-spacing="false" fo:line-height="144%" fo:text-indent="0cm" style:auto-text-indent="false" style:writing-mode="lr-tb"/>
      <style:text-properties fo:font-weight="normal"/>
    </style:style>
    <style:style style:name="P40" style:family="paragraph" style:parent-style-name="Heading_20_2" style:list-style-name="L13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1.27cm" fo:margin-right="0cm" fo:margin-top="0.212cm" fo:margin-bottom="0cm" style:contextual-spacing="false" fo:line-height="120%" fo:text-indent="0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42" style:family="paragraph" style:parent-style-name="Heading_20_2" style:list-style-name="L14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3" style:family="paragraph" style:parent-style-name="Heading_20_2" style:list-style-name="L15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4" style:family="paragraph" style:parent-style-name="Heading_20_2" style:list-style-name="L16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5" style:family="paragraph" style:parent-style-name="Heading_20_2" style:list-style-name="L17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6" style:family="paragraph" style:parent-style-name="Heading_20_2">
      <style:paragraph-properties fo:margin-left="1.27cm" fo:margin-right="0cm" fo:margin-top="0.564cm" fo:margin-bottom="0cm" style:contextual-spacing="false" fo:line-height="120%" fo:text-indent="0cm" style:auto-text-indent="false" style:writing-mode="lr-tb"/>
      <style:text-properties fo:font-weight="normal"/>
    </style:style>
    <style:style style:name="P47" style:family="paragraph" style:parent-style-name="Text_20_body">
      <style:paragraph-properties fo:margin-left="0cm" fo:margin-right="0cm" fo:margin-top="0.212cm" fo:margin-bottom="0cm" style:contextual-spacing="false" fo:line-height="144%" fo:text-indent="1.27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48" style:family="paragraph" style:parent-style-name="Heading_20_2" style:list-style-name="L18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left="0cm" fo:margin-right="0cm" fo:margin-top="0.212cm" fo:margin-bottom="0cm" style:contextual-spacing="false" fo:line-height="120%" fo:text-indent="1.27cm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50" style:family="paragraph" style:parent-style-name="Heading_20_2" style:list-style-name="L19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51" style:family="paragraph" style:parent-style-name="Heading_20_2" style:list-style-name="L20">
      <loext:graphic-properties draw:fill="none" draw:fill-color="#ffffff"/>
      <style:paragraph-properties fo:margin-left="0cm" fo:margin-right="0cm" fo:margin-top="0.564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8575" loext:opacity="100%" style:text-line-through-style="none" style:text-line-through-type="none" style:font-name="PT Sans Narrow" fo:font-size="16pt" fo:font-style="normal" style:text-underline-style="none" fo:font-weight="normal" style:text-blinking="false" fo:background-color="transparent"/>
    </style:style>
    <style:style style:name="P52" style:family="paragraph" style:parent-style-name="Heading_20_2">
      <style:paragraph-properties fo:margin-left="1.27cm" fo:margin-right="0cm" fo:margin-top="0.564cm" fo:margin-bottom="0cm" style:contextual-spacing="false" fo:line-height="120%" fo:text-indent="0cm" style:auto-text-indent="false" style:writing-mode="lr-tb"/>
      <style:text-properties fo:font-variant="normal" fo:text-transform="none" fo:color="#008575" loext:opacity="100%" style:text-line-through-style="none" style:text-line-through-type="none" style:text-underline-style="none" style:text-blinking="false" fo:background-color="transparent"/>
    </style:style>
    <style:style style:name="P53" style:family="paragraph" style:parent-style-name="Heading_20_2">
      <style:paragraph-properties fo:margin-left="0cm" fo:margin-right="0cm" fo:margin-top="0.635cm" fo:margin-bottom="0.141cm" style:contextual-spacing="false" fo:line-height="144%" fo:text-indent="0cm" style:auto-text-indent="false" style:writing-mode="lr-tb"/>
      <style:text-properties fo:font-variant="normal" fo:text-transform="none" fo:color="#ff5e0e" loext:opacity="100%" style:text-line-through-style="none" style:text-line-through-type="none" style:font-name="PT Sans Narrow" fo:font-size="18pt" fo:font-style="normal" style:text-underline-style="none" fo:font-weight="bold" style:text-blinking="false" fo:background-color="transparent"/>
    </style:style>
    <style:style style:name="P54" style:family="paragraph" style:parent-style-name="Text_20_body">
      <style:paragraph-properties fo:margin-left="0cm" fo:margin-right="0cm" fo:margin-top="0.423cm" fo:margin-bottom="0.423cm" style:contextual-spacing="false" fo:line-height="144%" fo:text-indent="0cm" style:auto-text-indent="false" style:writing-mode="lr-tb"/>
      <style:text-properties fo:font-weight="normal"/>
    </style:style>
    <style:style style:name="T1" style:family="text">
      <style:text-properties style:font-name="Open Sans" fo:font-size="11pt" fo:font-style="normal" fo:font-weight="normal"/>
    </style:style>
    <style:style style:name="T2" style:family="text">
      <style:text-properties style:font-name="Open Sans" fo:font-size="11pt" fo:font-style="normal" fo:font-weight="bold"/>
    </style:style>
    <style:style style:name="T3" style:family="text"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8575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695d46" loext:opacity="100%" style:text-line-through-style="none" style:text-line-through-type="none" style:font-name="Open Sans" fo:font-size="11pt" fo:font-style="normal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aaf65dc-7fff-0bb0-0a1b-a0ec846614a6"/>Access-Manga</text:p>
      <text:p text:style-name="Text_20_body"/>
      <text:p text:style-name="P2">21.05.2026</text:p>
      <text:p text:style-name="P3">─</text:p>
      <text:p text:style-name="P4">Contributeur : </text:p>
      <text:p text:style-name="P4">Franck Sanchez initiateur du projet</text:p>
      <text:p text:style-name="P4">David Soutarson développeur du projet</text:p>
      <text:p text:style-name="Text_20_body"/>
      <text:h text:style-name="P5" text:outline-level="1">Vue d'ensemble</text:h>
      <text:p text:style-name="P6">Application de lecture manga immersive avec IA</text:p>
      <text:p text:style-name="P7">🎯 <text:span text:style-name="T1">Cible utilisateur</text:span></text:p>
      <text:list text:style-name="L1">
        <text:list-item>
          <text:p text:style-name="P8">Fans de mangas / anime</text:p>
        </text:list-item>
        <text:list-item>
          <text:p text:style-name="P9">Utilisateurs qui veulent écouter plutôt que lire</text:p>
        </text:list-item>
        <text:list-item>
          <text:p text:style-name="P9">Personnes avec difficultés de lecture (accessibilité).</text:p>
        </text:list-item>
        <text:list-item>
          <text:p text:style-name="P9">malvoyants</text:p>
        </text:list-item>
        <text:list-item>
          <text:p text:style-name="P9">dyslexie</text:p>
        </text:list-item>
        <text:list-item>
          <text:p text:style-name="P9">fatigue visuelle</text:p>
        </text:list-item>
      </text:list>
      <text:h text:style-name="P5" text:outline-level="1">Objectifs</text:h>
      <text:list text:style-name="L2">
        <text:list-item>
          <text:p text:style-name="P10">Créer une application mobile capable de transformer la lecture de mangas (ou BD/webtoons) en une expérience immersive, avec lecture automatique des dialogues et génération de voix pour chaque personnage.</text:p>
        </text:list-item>
        <text:list-item>
          <text:p text:style-name="P11">Créer une nouvelle façon de consommer les mangas, plus immersive, moderne et accessible, proche d’un “anime interactif”.</text:p>
        </text:list-item>
        <text:list-item>
          <text:p text:style-name="P11"><text:soft-page-break/>L’objectif est de donner l’impression d’un “manga vivant”, comme un mélange entre lecture et anime.</text:p>
        </text:list-item>
      </text:list>
      <text:p text:style-name="P7">⚙️ <text:span text:style-name="T2">Fonctionnalités principales</text:span></text:p>
      <text:list text:style-name="L3">
        <text:list-item>
          <text:p text:style-name="P12">Analyse de pages importées (images/photo/captures) de manga</text:p>
        </text:list-item>
        <text:list-item>
          <text:p text:style-name="P13">Détection des bulles de dialogue</text:p>
        </text:list-item>
        <text:list-item>
          <text:p text:style-name="P13">Lecture vocale des textes</text:p>
        </text:list-item>
        <text:list-item>
          <text:p text:style-name="P13">Description des images</text:p>
        </text:list-item>
        <text:list-item>
          <text:p text:style-name="P13">Lecture page par page</text:p>
        </text:list-item>
      </text:list>
      <text:h text:style-name="P14" text:outline-level="2">🔊 <text:span text:style-name="T2">Fonctionnalités immersives</text:span></text:h>
      <text:list text:style-name="L4">
        <text:list-item>
          <text:p text:style-name="P15">Attribution de voix différentes selon les personnages</text:p>
        </text:list-item>
        <text:list-item>
          <text:p text:style-name="P16">Identification des personnages</text:p>
        </text:list-item>
        <text:list-item>
          <text:p text:style-name="P16">Personnalisation des voix</text:p>
        </text:list-item>
        <text:list-item>
          <text:p text:style-name="P17">Mode narration immersive</text:p>
        </text:list-item>
      </text:list>
      <text:h text:style-name="P14" text:outline-level="2">⚙️ <text:span text:style-name="T2">Fonctionnalités avancées futures</text:span></text:h>
      <text:list text:style-name="L5">
        <text:list-item>
          <text:p text:style-name="P18">Scan complet d’un manga</text:p>
        </text:list-item>
        <text:list-item>
          <text:p text:style-name="P19">Défilement automatique</text:p>
        </text:list-item>
        <text:list-item>
          <text:p text:style-name="P19">Réglage de vitesse de lecture</text:p>
        </text:list-item>
        <text:list-item>
          <text:p text:style-name="P19">Mode manuel / automatique</text:p>
        </text:list-item>
        <text:list-item>
          <text:p text:style-name="P20">Sauvegarde des préférences utilisateur</text:p>
        </text:list-item>
      </text:list>
      <text:h text:style-name="P14" text:outline-level="2">✅ <text:span text:style-name="T2">Modes personnalisables</text:span></text:h>
      <text:list text:style-name="L6">
        <text:list-item>
          <text:p text:style-name="P21">Dialogue uniquement</text:p>
        </text:list-item>
        <text:list-item>
          <text:p text:style-name="P22">Dialogue + narration</text:p>
        </text:list-item>
        <text:list-item>
          <text:p text:style-name="P22">Activation/désactivation des voix</text:p>
        </text:list-item>
        <text:list-item>
          <text:p text:style-name="P23">Avec ou sans défilement automatique</text:p>
        </text:list-item>
      </text:list>
      <text:p text:style-name="P7">📚 <text:span text:style-name="T2">Compatibilité </text:span></text:p>
      <text:list text:style-name="L7">
        <text:list-item>
          <text:p text:style-name="P24">Mangas</text:p>
        </text:list-item>
        <text:list-item>
          <text:p text:style-name="P25">Webtoons</text:p>
        </text:list-item>
        <text:list-item>
          <text:p text:style-name="P25">Bandes dessinées</text:p>
        </text:list-item>
      </text:list>
      <text:h text:style-name="P5" text:outline-level="1"><text:soft-page-break/>Caractéristiques</text:h>
      <text:list text:style-name="L8">
        <text:list-item>
          <text:p text:style-name="P26">- Expérience de lecture immersive assistée par IA</text:p>
        </text:list-item>
        <text:list-item>
          <text:p text:style-name="P27">- Application pensée pour l’accessibilité et le confort visuel</text:p>
        </text:list-item>
        <text:list-item>
          <text:p text:style-name="P27">- Lecture vocale intelligente des dialogues</text:p>
        </text:list-item>
        <text:list-item>
          <text:p text:style-name="P27">- Compatibilité avec mangas, webtoons et bandes dessinées</text:p>
        </text:list-item>
        <text:list-item>
          <text:p text:style-name="P27">- Système de narration personnalisable</text:p>
        </text:list-item>
        <text:list-item>
          <text:p text:style-name="P27">- Architecture évolutive pensée pour les futures améliorations</text:p>
        </text:list-item>
        <text:list-item>
          <text:p text:style-name="P27">- Interface simple et intuitive</text:p>
        </text:list-item>
        <text:list-item>
          <text:p text:style-name="P27">- Expérience proche d’un “anime interactif”</text:p>
        </text:list-item>
      </text:list>
      <text:p text:style-name="P7">🛠️ <text:span text:style-name="T2">Contribution et développement</text:span></text:p>
      <text:list text:style-name="L9">
        <text:list-item>
          <text:p text:style-name="P28">- Possibilité d’utilisation avec IA locale</text:p>
        </text:list-item>
        <text:list-item>
          <text:p text:style-name="P29">- Architecture pensée pour évoluer avec différents modèles IA</text:p>
        </text:list-item>
        <text:list-item>
          <text:p text:style-name="P29">- Projet ouvert à la contribution et à l’expérimentation </text:p>
        </text:list-item>
      </text:list>
      <text:h text:style-name="P30" text:outline-level="2"><text:span text:style-name="T3">🖥️ </text:span><text:span text:style-name="T4">Configuration recommandée pour tester IA locale</text:span><text:span text:style-name="T5"> </text:span></text:h>
      <text:list text:style-name="L10">
        <text:list-item>
          <text:p text:style-name="P31">- CPU moderne </text:p>
        </text:list-item>
        <text:list-item>
          <text:p text:style-name="P32">- AMD Ryzen 5 / Ryzen 7 récent recommandé</text:p>
        </text:list-item>
        <text:list-item>
          <text:p text:style-name="P32">- Intel i5 / i7 récent recommandé </text:p>
        </text:list-item>
        <text:list-item>
          <text:p text:style-name="P32">- 16 Go RAM minimum (32 Go recommandé)</text:p>
        </text:list-item>
        <text:list-item>
          <text:p text:style-name="P32">- GPU NVIDIA 8–12 Go VRAM (12 Go recommandé)</text:p>
        </text:list-item>
        <text:list-item>
          <text:p text:style-name="P32">- SSD NVMe </text:p>
        </text:list-item>
      </text:list>
      <text:p text:style-name="P7">⚠️ <text:span text:style-name="T1">Une configuration puissante est uniquement nécessaire pour le développement IA local.</text:span></text:p>
      <text:p text:style-name="P33">Les testeurs et contributeurs non techniques peuvent participer au projet avec une configuration bureautique classique. </text:p>
      <text:h text:style-name="P34" text:outline-level="2">⚠️ <text:span text:style-name="T2">Risques et limitations de l’IA locale</text:span></text:h>
      <text:p text:style-name="P6">L’utilisation d’une intelligence artificielle locale (Ollama, LLaVA ou autres modèles IA) peut demander beaucoup de ressources matérielles.</text:p>
      <text:p text:style-name="Text_20_body"/>
      <text:p text:style-name="P7">🔥 <text:span text:style-name="T2">Charge matérielle importante</text:span></text:p>
      <text:p text:style-name="P6">L’analyse d’images et les modèles IA peuvent fortement solliciter :</text:p>
      <text:p text:style-name="P6">- le processeur (CPU)</text:p>
      <text:p text:style-name="P6">- la carte graphique (GPU)</text:p>
      <text:p text:style-name="P6">- la mémoire RAM</text:p>
      <text:p text:style-name="P6"><text:soft-page-break/>Cela peut provoquer :</text:p>
      <text:p text:style-name="P6">- une forte utilisation des ventilateurs</text:p>
      <text:p text:style-name="P6">- une augmentation de la température du PC</text:p>
      <text:p text:style-name="P6">- une consommation électrique plus importante</text:p>
      <text:p text:style-name="P6">---</text:p>
      <text:p text:style-name="P35"><text:span text:style-name="T3"> 🌡️ </text:span><text:span text:style-name="T4">Température et performances</text:span></text:p>
      <text:p text:style-name="P6">Une mauvaise ventilation ou un refroidissement insuffisant peut entraîner :</text:p>
      <text:p text:style-name="P6">- ralentissements</text:p>
      <text:p text:style-name="P6">- baisse de performances</text:p>
      <text:p text:style-name="P6">- surchauffe</text:p>
      <text:p text:style-name="P7">👉 <text:span text:style-name="T1">Une configuration correctement refroidie est recommandée.</text:span></text:p>
      <text:p text:style-name="P6">---</text:p>
      <text:p text:style-name="P7">⚡ <text:span text:style-name="T2">Consommation énergétique</text:span></text:p>
      <text:p text:style-name="P6">Les modèles IA locaux peuvent consommer davantage d’électricité qu’une utilisation bureautique classique.</text:p>
      <text:p text:style-name="P6">---</text:p>
      <text:p text:style-name="P7"> 🖥️ <text:span text:style-name="T1">Compatibilité matérielle</text:span></text:p>
      <text:p text:style-name="P6">Certaines fonctionnalités IA peuvent être limitées ou très lentes sur :</text:p>
      <text:p text:style-name="P6">- les anciens processeurs</text:p>
      <text:p text:style-name="P6">- les cartes graphiques peu puissantes</text:p>
      <text:p text:style-name="P6">- les PC sans GPU dédié</text:p>
      <text:p text:style-name="P6">---</text:p>
      <text:p text:style-name="P35"><text:span text:style-name="T3">⏳ </text:span><text:span text:style-name="T4">Temps de traitemen</text:span><text:span text:style-name="T6">t</text:span></text:p>
      <text:p text:style-name="P6">Selon la configuration :</text:p>
      <text:p text:style-name="P6">- l’analyse d’une image peut prendre plusieurs secondes</text:p>
      <text:p text:style-name="P6">- certaines fonctions avancées peuvent être lentes</text:p>
      <text:p text:style-name="P6">---</text:p>
      <text:p text:style-name="P7"> 🌐 <text:span text:style-name="T2">Hébergement et coût</text:span></text:p>
      <text:p text:style-name="P6">L’hébergement d’une IA locale en ligne peut nécessiter :</text:p>
      <text:p text:style-name="P6">- un serveur puissant</text:p>
      <text:p text:style-name="P6"><text:soft-page-break/>- un GPU dédié</text:p>
      <text:p text:style-name="P6">- des coûts supplémentaires</text:p>
      <text:p text:style-name="P6">Le projet cherche actuellement des solutions d’hébergement accessibles financièrement pour les premières versions publiques.</text:p>
      <text:p text:style-name="P6">---</text:p>
      <text:p text:style-name="P7">🧪 <text:span text:style-name="T2">Projet expérimental</text:span></text:p>
      <text:p text:style-name="P6">Access-Manga est actuellement un projet expérimental en développement.</text:p>
      <text:p text:style-name="P6">Certaines fonctionnalités peuvent :</text:p>
      <text:p text:style-name="P6">- évoluer</text:p>
      <text:p text:style-name="P6">- changer</text:p>
      <text:p text:style-name="P6">- être instables durant les phases alpha. </text:p>
      <text:p text:style-name="Text_20_body"/>
      <text:h text:style-name="P30" text:outline-level="2"><text:span text:style-name="T3">👍 </text:span><text:span text:style-name="T4">Avantage IA local</text:span></text:h>
      <text:p text:style-name="Text_20_body"/>
      <text:p text:style-name="P6">Les traitements IA réalisés en local permettent de conserver les données sur la machine de l’utilisateur.</text:p>
      <text:p text:style-name="P6">Cependant :</text:p>
      <text:p text:style-name="P6">- aucune sécurité absolue ne peut être garantie</text:p>
      <text:p text:style-name="P6">- les utilisateurs restent responsables des contenus importés</text:p>
      <text:p text:style-name="P6">---</text:p>
      <text:h text:style-name="P5" text:outline-level="1">Grandes étapes</text:h>
      <text:list text:style-name="L11">
        <text:list-item>
          <text:list>
            <text:list-item>
              <text:h text:style-name="P36" text:outline-level="2">idée  </text:h>
            </text:list-item>
          </text:list>
        </text:list-item>
      </text:list>
      <text:p text:style-name="P37">- Définition du concept</text:p>
      <text:p text:style-name="P37">- Public cible</text:p>
      <text:p text:style-name="P37">- Objectifs .</text:p>
      <text:list text:style-name="L12">
        <text:list-item>
          <text:list>
            <text:list-item>
              <text:h text:style-name="P38" text:outline-level="2">Architecture simple  </text:h>
            </text:list-item>
          </text:list>
        </text:list-item>
      </text:list>
      <text:p text:style-name="P37">Séparation frontend / backend / IA</text:p>
      <text:p text:style-name="P39"><text:soft-page-break/><text:span text:style-name="T7">- Choix des technologies .</text:span></text:p>
      <text:list text:style-name="L13">
        <text:list-item>
          <text:list>
            <text:list-item>
              <text:h text:style-name="P40" text:outline-level="2">Création de la maquette “maquette évolutive”</text:h>
            </text:list-item>
          </text:list>
        </text:list-item>
      </text:list>
      <text:p text:style-name="P41">Maquette (UI/UX)</text:p>
      <text:p text:style-name="P41">- Création d’une interface HTML/CSS simple</text:p>
      <text:p text:style-name="P41">- Écran upload image</text:p>
      <text:p text:style-name="P41">- Bouton “Analyser”</text:p>
      <text:p text:style-name="P41">- Affichage JSON brut </text:p>
      <text:list text:style-name="L14">
        <text:list-item>
          <text:list>
            <text:list-item>
              <text:h text:style-name="P42" text:outline-level="2">PHP locale </text:h>
            </text:list-item>
          </text:list>
        </text:list-item>
      </text:list>
      <text:p text:style-name="P37">API locale PHP</text:p>
      <text:p text:style-name="P37">- Création d’un backend simple</text:p>
      <text:p text:style-name="P37">- Endpoint `/analyze`</text:p>
      <text:p text:style-name="P37">- Upload d’image</text:p>
      <text:p text:style-name="P37">- Retour JSON </text:p>
      <text:list text:style-name="L15">
        <text:list-item>
          <text:list>
            <text:list-item>
              <text:h text:style-name="P43" text:outline-level="2">JSON locale</text:h>
            </text:list-item>
          </text:list>
        </text:list-item>
      </text:list>
      <text:p text:style-name="P37">Traitement JSON</text:p>
      <text:p text:style-name="P37">- Parsing des données</text:p>
      <text:p text:style-name="P37">- Structuration des bulles</text:p>
      <text:p text:style-name="P37">- Affichage lisibl </text:p>
      <text:list text:style-name="L16">
        <text:list-item>
          <text:list>
            <text:list-item>
              <text:h text:style-name="P44" text:outline-level="2">IA (Ollama + LLaVA) locale</text:h>
            </text:list-item>
          </text:list>
        </text:list-item>
      </text:list>
      <text:p text:style-name="P37">IA locale</text:p>
      <text:p text:style-name="P37">- Intégration de Ollama</text:p>
      <text:p text:style-name="P37">- Utilisation de LLaV </text:p>
      <text:p text:style-name="P37">- Analyse des images de mangas</text:p>
      <text:p text:style-name="P37">- Extraction des dialogues et scènes </text:p>
      <text:list text:style-name="L17">
        <text:list-item>
          <text:list>
            <text:list-item>
              <text:h text:style-name="P45" text:outline-level="2">MVP local complet  </text:h>
            </text:list-item>
          </text:list>
        </text:list-item>
      </text:list>
      <text:h text:style-name="P46" text:outline-level="2"><text:span text:style-name="T4">Objectif : </text:span><text:span text:style-name="T7">Créer une version qui fonctionne, même si elle est basique.</text:span></text:h>
      <text:p text:style-name="P6">- upload image</text:p>
      <text:p text:style-name="P47">- analyse IA</text:p>
      <text:p text:style-name="P47"><text:soft-page-break/>- retour JSON structuré</text:p>
      <text:p text:style-name="P47">- affichage des résultats</text:p>
      <text:p text:style-name="P7">👉 <text:span text:style-name="T1">C’est la première version réellement utilisable du projet. </text:span></text:p>
      <text:list text:style-name="L18">
        <text:list-item>
          <text:list>
            <text:list-item>
              <text:h text:style-name="P48" text:outline-level="2">Tests et amélioration  </text:h>
            </text:list-item>
          </text:list>
        </text:list-item>
      </text:list>
      <text:p text:style-name="P49">- trouver solution hébergement peu coûteux pour 1er test</text:p>
      <text:p text:style-name="P49">- Tests utilisateurs</text:p>
      <text:p text:style-name="P49">- Correction des bugs</text:p>
      <text:p text:style-name="P49">- Amélioration des prompts IA</text:p>
      <text:p text:style-name="P49">- Optimisation des résultats </text:p>
      <text:list text:style-name="L19">
        <text:list-item>
          <text:list>
            <text:list-item>
              <text:h text:style-name="P50" text:outline-level="2">Analyse des coup réelle de mise en ligne</text:h>
            </text:list-item>
          </text:list>
        </text:list-item>
      </text:list>
      <text:p text:style-name="P37">- Serveur VPS ou GPU</text:p>
      <text:p text:style-name="P37">- Coût IA locale ou cloud</text:p>
      <text:p text:style-name="P37">- Optimisation des ressources</text:p>
      <text:p text:style-name="P37">- Limitation des utilisateurs en alpha </text:p>
      <text:list text:style-name="L20">
        <text:list-item>
          <text:list>
            <text:list-item>
              <text:h text:style-name="P51" text:outline-level="2">Déploiement alpha </text:h>
            </text:list-item>
          </text:list>
        </text:list-item>
      </text:list>
      <text:p text:style-name="P37">- Mise en ligne du projet</text:p>
      <text:p text:style-name="P37">- Limitation des utilisateurs</text:p>
      <text:p text:style-name="P37">- Feedback public</text:p>
      <text:p text:style-name="P37">- Amélioration continue </text:p>
      <text:h text:style-name="P52" text:outline-level="2"> </text:h>
      <text:h text:style-name="P53" text:outline-level="2">Vision du projet</text:h>
      <text:p text:style-name="P54"><text:span text:style-name="T7">Access-Manga souhaite proposer une nouvelle façon de découvrir les mangas :<text:line-break/>un mélange entre lecture classique, accessibilité et immersion proche d’un anime interactif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PT Sans Narrow" svg:font-family="'PT Sans Narrow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3:49:39.436423600</meta:creation-date>
    <dc:date>2026-05-22T03:50:37.684482700</dc:date>
    <meta:editing-duration>PT58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7" meta:paragraph-count="177" meta:word-count="949" meta:character-count="5981" meta:non-whitespace-character-count="5232"/>
  </office:meta>
</office:document-meta>
</file>